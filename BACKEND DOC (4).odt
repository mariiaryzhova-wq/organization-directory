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ableColumn15" style:family="table-column">
      <style:table-column-properties style:column-width="3.1305in"/>
    </style:style>
    <style:style style:name="TableColumn16" style:family="table-column">
      <style:table-column-properties style:column-width="3.1305in"/>
    </style:style>
    <style:style style:name="Table14" style:family="table">
      <style:table-properties style:width="6.2611in" fo:margin-left="0in" table:align="left"/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Обычный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Обычный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22" style:family="table-row">
      <style:table-row-properties style:min-row-height="0.2083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fo:margin-bottom="0in" fo:line-height="100%"/>
      <style:text-properties fo:language="en" fo:country="U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Обычный" style:family="paragraph">
      <style:paragraph-properties fo:margin-bottom="0in" fo:line-height="100%"/>
      <style:text-properties fo:language="en" fo:country="US"/>
    </style:style>
    <style:style style:name="TableRow27" style:family="table-row">
      <style:table-row-properties style:min-row-height="0.2083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Обычный" style:family="paragraph">
      <style:paragraph-properties fo:margin-bottom="0in" fo:line-height="100%"/>
      <style:text-properties fo:language="en" fo:country="U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Обычный" style:family="paragraph">
      <style:paragraph-properties fo:margin-bottom="0in" fo:line-height="100%"/>
      <style:text-properties fo:language="en" fo:country="US"/>
    </style:style>
    <style:style style:name="TableRow32" style:family="table-row">
      <style:table-row-properties style:min-row-height="0.2083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Обычный" style:family="paragraph">
      <style:paragraph-properties fo:margin-bottom="0in" fo:line-height="100%"/>
      <style:text-properties fo:language="en" fo:country="U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Обычный" style:family="paragraph">
      <style:paragraph-properties fo:margin-bottom="0in" fo:line-height="100%"/>
      <style:text-properties fo:language="en" fo:country="US"/>
    </style:style>
    <style:style style:name="TableRow37" style:family="table-row">
      <style:table-row-properties style:min-row-height="0.2083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Обычный" style:family="paragraph">
      <style:paragraph-properties fo:margin-bottom="0in" fo:line-height="100%"/>
      <style:text-properties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Обычный" style:family="paragraph">
      <style:paragraph-properties fo:margin-bottom="0in" fo:line-height="100%"/>
      <style:text-properties fo:language="en" fo:country="US"/>
    </style:style>
    <style:style style:name="TableRow42" style:family="table-row">
      <style:table-row-properties style:min-row-height="0.2083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Обычный" style:family="paragraph">
      <style:paragraph-properties fo:margin-bottom="0in" fo:line-height="100%"/>
      <style:text-properties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Обычный" style:family="paragraph">
      <style:paragraph-properties fo:margin-bottom="0in" fo:line-height="100%"/>
      <style:text-properties fo:language="en" fo:country="US"/>
    </style:style>
    <style:style style:name="TableRow47" style:family="table-row">
      <style:table-row-properties style:min-row-height="0.2083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Обычный" style:family="paragraph">
      <style:paragraph-properties fo:margin-bottom="0in" fo:line-height="100%"/>
      <style:text-properties fo:language="en" fo:country="U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Обычный" style:family="paragraph">
      <style:paragraph-properties fo:margin-bottom="0in" fo:line-height="100%"/>
      <style:text-properties fo:language="en" fo:country="US"/>
    </style:style>
    <style:style style:name="TableColumn53" style:family="table-column">
      <style:table-column-properties style:column-width="3.1305in"/>
    </style:style>
    <style:style style:name="TableColumn54" style:family="table-column">
      <style:table-column-properties style:column-width="3.1305in"/>
    </style:style>
    <style:style style:name="Table52" style:family="table">
      <style:table-properties style:width="6.2611in" fo:margin-left="0in" table:align="left"/>
    </style:style>
    <style:style style:name="TableRow55" style:family="table-row">
      <style:table-row-properties style:min-row-height="0.2083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Обычный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Обычный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60" style:family="table-row">
      <style:table-row-properties style:min-row-height="0.2083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Обычный" style:family="paragraph">
      <style:paragraph-properties fo:margin-bottom="0in" fo:line-height="100%"/>
      <style:text-properties fo:language="en" fo:country="U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Обычный" style:family="paragraph">
      <style:paragraph-properties fo:margin-bottom="0in" fo:line-height="100%"/>
      <style:text-properties fo:language="en" fo:country="US"/>
    </style:style>
    <style:style style:name="TableRow65" style:family="table-row">
      <style:table-row-properties style:min-row-height="0.2083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Обычный" style:family="paragraph">
      <style:paragraph-properties fo:margin-bottom="0in" fo:line-height="100%"/>
      <style:text-properties fo:language="en" fo:country="U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Обычный" style:family="paragraph">
      <style:paragraph-properties fo:margin-bottom="0in" fo:line-height="100%"/>
      <style:text-properties fo:language="en" fo:country="US"/>
    </style:style>
    <style:style style:name="TableRow70" style:family="table-row">
      <style:table-row-properties style:min-row-height="0.2083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Обычный" style:family="paragraph">
      <style:paragraph-properties fo:margin-bottom="0in" fo:line-height="100%"/>
      <style:text-properties fo:language="en" fo:country="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Обычный" style:family="paragraph">
      <style:paragraph-properties fo:margin-bottom="0in" fo:line-height="100%"/>
      <style:text-properties fo:language="en" fo:country="US"/>
    </style:style>
    <style:style style:name="TableRow75" style:family="table-row">
      <style:table-row-properties style:min-row-height="0.2083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Обычный" style:family="paragraph">
      <style:paragraph-properties fo:margin-bottom="0in" fo:line-height="100%"/>
      <style:text-properties fo:language="en" fo:country="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Обычный" style:family="paragraph">
      <style:paragraph-properties fo:margin-bottom="0in" fo:line-height="100%"/>
      <style:text-properties fo:language="en" fo:country="US"/>
    </style:style>
    <style:style style:name="TableRow80" style:family="table-row">
      <style:table-row-properties style:min-row-height="0.2083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Обычный" style:family="paragraph">
      <style:paragraph-properties fo:margin-bottom="0in" fo:line-height="100%"/>
      <style:text-properties fo:language="en" fo:country="U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Обычный" style:family="paragraph">
      <style:paragraph-properties fo:margin-bottom="0in" fo:line-height="100%"/>
      <style:text-properties fo:language="en" fo:country="US"/>
    </style:style>
    <style:style style:name="TableRow85" style:family="table-row">
      <style:table-row-properties style:min-row-height="0.2083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Обычный" style:family="paragraph">
      <style:paragraph-properties fo:margin-bottom="0in" fo:line-height="100%"/>
      <style:text-properties fo:language="en" fo:country="U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Обычный" style:family="paragraph">
      <style:paragraph-properties fo:margin-bottom="0in" fo:line-height="100%"/>
      <style:text-properties fo:language="en" fo:country="US"/>
    </style:style>
    <style:style style:name="P90" style:parent-style-name="Безинтервала" style:family="paragraph">
      <style:text-properties fo:language="en" fo:country="US"/>
    </style:style>
    <style:style style:name="P91" style:parent-style-name="Безинтервала" style:family="paragraph">
      <style:text-properties fo:language="en" fo:country="US"/>
    </style:style>
    <style:style style:name="P92" style:parent-style-name="Безинтервала" style:family="paragraph">
      <style:text-properties fo:language="en" fo:country="US"/>
    </style:style>
    <style:style style:name="P93" style:parent-style-name="Безинтервала" style:family="paragraph">
      <style:text-properties fo:language="en" fo:country="US"/>
    </style:style>
    <style:style style:name="P94" style:parent-style-name="Безинтервала" style:family="paragraph">
      <style:text-properties fo:language="en" fo:country="US"/>
    </style:style>
    <style:style style:name="P95" style:parent-style-name="Безинтервала" style:family="paragraph">
      <style:text-properties fo:language="en" fo:country="US"/>
    </style:style>
    <style:style style:name="P96" style:parent-style-name="Безинтервала" style:family="paragraph">
      <style:text-properties fo:language="en" fo:country="US"/>
    </style:style>
    <style:style style:name="P97" style:parent-style-name="Безинтервала" style:family="paragraph">
      <style:text-properties fo:language="en" fo:country="US"/>
    </style:style>
    <style:style style:name="P98" style:parent-style-name="Безинтервала" style:family="paragraph">
      <style:text-properties fo:language="en" fo:country="US"/>
    </style:style>
    <style:style style:name="P99" style:parent-style-name="Безинтервала" style:family="paragraph">
      <style:text-properties fo:language="en" fo:country="US"/>
    </style:style>
    <style:style style:name="P100" style:parent-style-name="Безинтервала" style:family="paragraph">
      <style:text-properties fo:language="en" fo:country="US"/>
    </style:style>
    <style:style style:name="P101" style:parent-style-name="Безинтервала" style:family="paragraph">
      <style:text-properties fo:language="en" fo:country="US"/>
    </style:style>
    <style:style style:name="P102" style:parent-style-name="Безинтервала" style:family="paragraph">
      <style:text-properties fo:language="en" fo:country="US"/>
    </style:style>
    <style:style style:name="P103" style:parent-style-name="Безинтервала" style:family="paragraph">
      <style:text-properties fo:language="en" fo:country="US"/>
    </style:style>
    <style:style style:name="P104" style:parent-style-name="Безинтервала" style:family="paragraph">
      <style:text-properties fo:language="en" fo:country="US"/>
    </style:style>
    <style:style style:name="P105" style:parent-style-name="Безинтервала" style:family="paragraph">
      <style:text-properties fo:language="en" fo:country="US"/>
    </style:style>
    <style:style style:name="P106" style:parent-style-name="Безинтервала" style:family="paragraph">
      <style:text-properties fo:language="en" fo:country="US"/>
    </style:style>
    <style:style style:name="P107" style:parent-style-name="Безинтервала" style:family="paragraph">
      <style:text-properties fo:language="en" fo:country="US"/>
    </style:style>
    <style:style style:name="P108" style:parent-style-name="Безинтервала" style:family="paragraph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style:font-name="Aptos" style:font-name-asian="Aptos" style:font-name-complex="Arial" fo:language="en" fo:country="US"/>
    </style:style>
    <style:style style:name="T154" style:parent-style-name="Основнойшрифтабзаца" style:family="text">
      <style:text-properties style:font-name="Aptos" style:font-name-asian="Aptos" style:font-name-complex="Arial" fo:font-weight="bold" style:font-weight-asian="bold" style:font-weight-complex="bold" fo:language="en" fo:country="US"/>
    </style:style>
    <style:style style:name="T155" style:parent-style-name="Основнойшрифтабзаца" style:family="text">
      <style:text-properties style:font-name="Aptos" style:font-name-asian="Aptos" style:font-name-complex="Arial" fo:language="en" fo:country="US"/>
    </style:style>
    <style:style style:name="T156" style:parent-style-name="Основнойшрифтабзаца" style:family="text">
      <style:text-properties style:font-name="Aptos" style:font-name-asian="Aptos" style:font-name-complex="Arial" fo:font-weight="bold" style:font-weight-asian="bold" style:font-weight-complex="bold" fo:language="en" fo:country="US"/>
    </style:style>
    <style:style style:name="T157" style:parent-style-name="Основнойшрифтабзаца" style:family="text">
      <style:text-properties style:font-name="Aptos" style:font-name-asian="Aptos" style:font-name-complex="Arial" fo:language="en" fo:country="US"/>
    </style:style>
    <style:style style:name="T158" style:parent-style-name="Основнойшрифтабзаца" style:family="text">
      <style:text-properties style:font-name="Aptos" style:font-name-asian="Aptos" style:font-name-complex="Arial" fo:font-weight="bold" style:font-weight-asian="bold" style:font-weight-complex="bold" fo:language="en" fo:country="US"/>
    </style:style>
    <style:style style:name="T159" style:parent-style-name="Основнойшрифтабзаца" style:family="text">
      <style:text-properties style:font-name="Aptos" style:font-name-asian="Aptos" style:font-name-complex="Arial" fo:language="en" fo:country="US"/>
    </style:style>
    <style:style style:name="T160" style:parent-style-name="Основнойшрифтабзаца" style:family="text">
      <style:text-properties style:font-name="Aptos" style:font-name-asian="Aptos" style:font-name-complex="Arial" fo:language="en" fo:country="US"/>
    </style:style>
    <style:style style:name="T161" style:parent-style-name="Основнойшрифтабзаца" style:family="text">
      <style:text-properties style:font-name="Aptos" style:font-name-asian="Aptos" style:font-name-complex="Arial" fo:font-weight="bold" style:font-weight-asian="bold" style:font-weight-complex="bold" fo:language="en" fo:country="US"/>
    </style:style>
    <style:style style:name="T162" style:parent-style-name="Основнойшрифтабзаца" style:family="text">
      <style:text-properties style:font-name="Aptos" style:font-name-asian="Aptos" style:font-name-complex="Arial" fo:language="en" fo:country="US"/>
    </style:style>
    <style:style style:name="T163" style:parent-style-name="Основнойшрифтабзаца" style:family="text">
      <style:text-properties style:font-name="Aptos" style:font-name-asian="Aptos" style:font-name-complex="Arial" fo:font-weight="bold" style:font-weight-asian="bold" style:font-weight-complex="bold" fo:language="en" fo:country="US"/>
    </style:style>
    <style:style style:name="T164" style:parent-style-name="Основнойшрифтабзаца" style:family="text">
      <style:text-properties style:font-name="Aptos" style:font-name-asian="Aptos" style:font-name-complex="Arial" fo:language="en" fo:country="US"/>
    </style:style>
    <style:style style:name="T165" style:parent-style-name="Основнойшрифтабзаца" style:family="text">
      <style:text-properties style:font-name="Aptos" style:font-name-asian="Aptos" style:font-name-complex="Arial" fo:language="en" fo:country="US"/>
    </style:style>
    <style:style style:name="T166" style:parent-style-name="Основнойшрифтабзаца" style:family="text">
      <style:text-properties style:font-name="Aptos" style:font-name-asian="Aptos" style:font-name-complex="Arial" fo:font-weight="bold" style:font-weight-asian="bold" style:font-weight-complex="bold" fo:language="en" fo:country="US"/>
    </style:style>
    <style:style style:name="T167" style:parent-style-name="Основнойшрифтабзаца" style:family="text">
      <style:text-properties style:font-name="Aptos" style:font-name-asian="Aptos" style:font-name-complex="Arial" fo:language="en" fo:country="US"/>
    </style:style>
    <style:style style:name="T168" style:parent-style-name="Основнойшрифтабзаца" style:family="text">
      <style:text-properties style:font-name="Aptos" style:font-name-asian="Aptos" style:font-name-complex="Arial" fo:font-weight="bold" style:font-weight-asian="bold" style:font-weight-complex="bold" fo:language="en" fo:country="US"/>
    </style:style>
    <style:style style:name="T169" style:parent-style-name="Основнойшрифтабзаца" style:family="text">
      <style:text-properties style:font-name="Aptos" style:font-name-asian="Aptos" style:font-name-complex="Arial" fo:language="en" fo:country="US"/>
    </style:style>
    <style:style style:name="T170" style:parent-style-name="Основнойшрифтабзаца" style:family="text">
      <style:text-properties style:font-name="Aptos" style:font-name-asian="Aptos" style:font-name-complex="Arial"/>
    </style:style>
    <style:style style:name="TableColumn172" style:family="table-column">
      <style:table-column-properties style:column-width="3.1305in"/>
    </style:style>
    <style:style style:name="TableColumn173" style:family="table-column">
      <style:table-column-properties style:column-width="3.1305in"/>
    </style:style>
    <style:style style:name="Table171" style:family="table">
      <style:table-properties style:width="6.2611in" fo:margin-left="0in" table:align="left"/>
    </style:style>
    <style:style style:name="TableRow174" style:family="table-row">
      <style:table-row-properties style:min-row-height="0.2083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Обычный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79" style:family="table-row">
      <style:table-row-properties style:min-row-height="0.2083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Обычный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Обычный" style:family="paragraph">
      <style:paragraph-properties fo:margin-bottom="0in" fo:line-height="100%"/>
    </style:style>
    <style:style style:name="TableRow184" style:family="table-row">
      <style:table-row-properties style:min-row-height="0.2083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Обычный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Обычный" style:family="paragraph">
      <style:paragraph-properties fo:margin-bottom="0in" fo:line-height="100%"/>
    </style:style>
    <style:style style:name="TableRow189" style:family="table-row">
      <style:table-row-properties style:min-row-height="0.2083in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margin-bottom="0in" fo:line-height="100%"/>
    </style:style>
    <style:style style:name="TableRow194" style:family="table-row">
      <style:table-row-properties style:min-row-height="0.2083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Обычный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Обычный" style:family="paragraph">
      <style:paragraph-properties fo:margin-bottom="0in" fo:line-height="100%"/>
    </style:style>
    <style:style style:name="TableRow199" style:family="table-row">
      <style:table-row-properties style:min-row-height="0.2083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Обычный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Обычный" style:family="paragraph">
      <style:paragraph-properties fo:margin-bottom="0in" fo:line-height="100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line-break/><text:line-break/><text:span text:style-name="T2">BACKEND група команди №5 “каталог організацій”</text:span><text:line-break/><text:span text:style-name="T3">team lead Кучерявенко Роман</text:span><text:line-break/><text:span text:style-name="T4">backend Іванченко Олександр</text:span><text:line-break/><text:span text:style-name="T5">backend Гриценко Руслан</text:span><text:line-break/><text:span text:style-name="T6">backend Мазуркевич Роман</text:span><text:line-break/><text:tab/><text:tab/><text:tab/><text:tab/><text:tab/><text:tab/><text:tab/><text:tab/><text:line-break/><text:line-break/><text:line-break/><text:line-break/><text:line-break/><text:line-break/><text:line-break/><text:line-break/><text:line-break/><text:tab/><text:tab/><text:tab/><text:tab/><text:span text:style-name="T7">Технічна документація<text:s/></text:span><text:line-break/><text:line-break/><text:line-break/><text:line-break/><text:line-break/><text:span text:style-name="T8">тема проєкту</text:span><text:span text:style-name="T9">: “каталог організацій”</text:span><text:line-break/><text:span text:style-name="T10">WEB-додаток який <text:s/>слугує для того аби <text:s/>надавати<text:s/></text:span><text:span text:style-name="T11">користувачу доступ <text:s/>до інформації в інтерактивному <text:s/>вигляді - плитками з <text:s/>коротким описом інформації щодо організації. Споживач використову</text:span><text:span text:style-name="T12">є це як потенційний клієн</text:span><text:span text:style-name="T13">т якому потрібні послуги які надають конкретні організації.</text:span><text:line-break/><text:line-break/></text:p>
      <text:p text:style-name="Обычный"><text:line-break/><text:line-break/></text:p>
      <text:p text:style-name="Обычный"><text:line-break/><text:line-break/><text:line-break/><text:line-break/><text:line-break/><text:line-break/><text:line-break/></text:p>
      <text:h text:style-name="Заголовок1" text:outline-level="1"><text:line-break/><text:line-break/><text:span text:style-name="Заголовок2Знак">1.1</text:span><text:span text:style-name="Заголовок2Знак">.</text:span><text:span text:style-name="Заголовок2Знак"><text:s/></text:span><text:span text:style-name="Заголовок2Знак">Технічний стек розробки</text:span><text:line-break/></text:h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Кoмпонент</text:p>
          </table:table-cell>
          <table:table-cell table:style-name="TableCell20">
            <text:p text:style-name="P21">Тeхнологія</text:p>
          </table:table-cell>
        </table:table-row>
        <table:table-row table:style-name="TableRow22">
          <table:table-cell table:style-name="TableCell23">
            <text:p text:style-name="P24">Runtime</text:p>
          </table:table-cell>
          <table:table-cell table:style-name="TableCell25">
            <text:p text:style-name="P26">Node js</text:p>
          </table:table-cell>
        </table:table-row>
        <table:table-row table:style-name="TableRow27">
          <table:table-cell table:style-name="TableCell28">
            <text:p text:style-name="P29">Data Base</text:p>
          </table:table-cell>
          <table:table-cell table:style-name="TableCell30">
            <text:p text:style-name="P31">MySQL</text:p>
          </table:table-cell>
        </table:table-row>
        <table:table-row table:style-name="TableRow32">
          <table:table-cell table:style-name="TableCell33">
            <text:p text:style-name="P34">Framework</text:p>
          </table:table-cell>
          <table:table-cell table:style-name="TableCell35">
            <text:p text:style-name="P36">Express.js</text:p>
          </table:table-cell>
        </table:table-row>
        <table:table-row table:style-name="TableRow37">
          <table:table-cell table:style-name="TableCell38">
            <text:p text:style-name="P39">ORM/Query builder</text:p>
          </table:table-cell>
          <table:table-cell table:style-name="TableCell40">
            <text:p text:style-name="P41">Mysql2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</table:table>
      <text:h text:style-name="Заголовок2" text:outline-level="2">1.2.<text:s/>Основні залежності</text:h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пакет</text:p>
          </table:table-cell>
          <table:table-cell table:style-name="TableCell58">
            <text:p text:style-name="P59">призначення</text:p>
          </table:table-cell>
        </table:table-row>
        <table:table-row table:style-name="TableRow60">
          <table:table-cell table:style-name="TableCell61">
            <text:p text:style-name="P62">Multer</text:p>
          </table:table-cell>
          <table:table-cell table:style-name="TableCell63">
            <text:p text:style-name="P64">Обробка multipart</text:p>
          </table:table-cell>
        </table:table-row>
        <table:table-row table:style-name="TableRow65">
          <table:table-cell table:style-name="TableCell66">
            <text:p text:style-name="P67">csv-parser</text:p>
          </table:table-cell>
          <table:table-cell table:style-name="TableCell68">
            <text:p text:style-name="P69">Парсинг csv файлів</text:p>
          </table:table-cell>
        </table:table-row>
        <table:table-row table:style-name="TableRow70">
          <table:table-cell table:style-name="TableCell71">
            <text:p text:style-name="P72">dotenv</text:p>
          </table:table-cell>
          <table:table-cell table:style-name="TableCell73">
            <text:p text:style-name="P74">Керування змінними <text:s/>середовища<text:s/></text:p>
          </table:table-cell>
        </table:table-row>
        <table:table-row table:style-name="TableRow75">
          <table:table-cell table:style-name="TableCell76">
            <text:p text:style-name="P77">cors</text:p>
          </table:table-cell>
          <table:table-cell table:style-name="TableCell78">
            <text:p text:style-name="P79">Налаштування CORS політики</text:p>
          </table:table-cell>
        </table:table-row>
        <table:table-row table:style-name="TableRow80">
          <table:table-cell table:style-name="TableCell81">
            <text:p text:style-name="P82">Express-validator<text:s/></text:p>
          </table:table-cell>
          <table:table-cell table:style-name="TableCell83">
            <text:p text:style-name="P84">Валідація вхідних даних</text:p>
          </table:table-cell>
        </table:table-row>
        <table:table-row table:style-name="TableRow85">
          <table:table-cell table:style-name="TableCell86">
            <text:p text:style-name="P87">mysql2</text:p>
          </table:table-cell>
          <table:table-cell table:style-name="TableCell88">
            <text:p text:style-name="P89">Пдключення до MySQL. Виконання SQL запитів.</text:p>
          </table:table-cell>
        </table:table-row>
      </table:table>
      <text:h text:style-name="Заголовок1" text:outline-level="1"><text:line-break/><text:span text:style-name="Заголовок2Знак">2</text:span><text:span text:style-name="Заголовок2Знак">.</text:span><text:span text:style-name="Заголовок2Знак"><text:s/>структура проєкту<text:s/></text:span><text:line-break/>project/</text:h>
      <text:p text:style-name="P90">├── src/</text:p>
      <text:p text:style-name="P91">│ <text:s text:c="2"/>├── routes/</text:p>
      <text:p text:style-name="P92">│ <text:s text:c="2"/>│ <text:s text:c="2"/>├── organizations.js</text:p>
      <text:p text:style-name="P93">│ <text:s text:c="2"/>│ <text:s text:c="2"/>└── categories.js</text:p>
      <text:p text:style-name="P94">│ <text:s text:c="2"/>├── controllers/</text:p>
      <text:p text:style-name="P95">│ <text:s text:c="2"/>│ <text:s text:c="2"/>├── organizations.js</text:p>
      <text:p text:style-name="P96">│ <text:s text:c="2"/>│ <text:s text:c="2"/>└── categories.js</text:p>
      <text:p text:style-name="P97">│ <text:s text:c="2"/>├── models/</text:p>
      <text:p text:style-name="P98">│ <text:s text:c="2"/>│ <text:s text:c="2"/>├── organization.js</text:p>
      <text:p text:style-name="P99">│ <text:s text:c="2"/>│ <text:s text:c="2"/>└── category.js</text:p>
      <text:p text:style-name="P100">│ <text:s text:c="2"/>├── middleware/</text:p>
      <text:p text:style-name="P101">│ <text:s text:c="2"/>│ <text:s text:c="2"/>├── validate.js</text:p>
      <text:p text:style-name="P102">│ <text:s text:c="2"/>│ <text:s text:c="2"/>├── errorHandler.js</text:p>
      <text:p text:style-name="P103">│ <text:s text:c="2"/>│ <text:s text:c="2"/>└── asyncHandler.js</text:p>
      <text:p text:style-name="P104">│ <text:s text:c="2"/>├── utils/</text:p>
      <text:p text:style-name="P105">│ <text:s text:c="2"/>│ <text:s text:c="2"/>└── csvParser.js</text:p>
      <text:p text:style-name="P106">│ <text:s text:c="2"/>└── db.js</text:p>
      <text:p text:style-name="P107">├── migrations/</text:p>
      <text:p text:style-name="P108">├── package.json</text:p>
      <text:p text:style-name="Безинтервала"><text:span text:style-name="T109">└── index.js</text:span><text:line-break/><text:line-break/></text:p>
      <text:p text:style-name="Обычный"><text:span text:style-name="T110">IDEF0 - <text:s/></text:span><text:span text:style-name="T111">діаграма</text:span><text:span text:style-name="T112"><text:s/>(функціональна модель)</text:span><text:line-break/><draw:frame draw:style-name="a0" draw:name="drawing" text:anchor-type="as-char" svg:x="0in" svg:y="0in" svg:width="6.26042in" svg:height="3.6875in" style:rel-width="scale" style:rel-height="scale"><draw:image xlink:href="media/image1.png" xlink:type="simple" xlink:show="embed" xlink:actuate="onLoad"/><svg:title/><svg:desc/></draw:frame><text:line-break/><text:tab/><text:tab/><text:tab/><text:tab/><text:tab/><text:span text:style-name="T113">рис.1 - А-0 композиція</text:span><text:line-break/><draw:frame draw:style-name="a1" draw:name="drawing" text:anchor-type="as-char" svg:x="0in" svg:y="0in" svg:width="6.26042in" svg:height="3.48958in" style:rel-width="scale" style:rel-height="scale"><draw:image xlink:href="media/image2.png" xlink:type="simple" xlink:show="embed" xlink:actuate="onLoad"/><svg:title/><svg:desc/></draw:frame><text:tab/><text:tab/><text:tab/><text:tab/><text:span text:style-name="T114">рис.2 - А0 декомпозиція (</text:span><text:span text:style-name="T115">сценарій<text:s/></text:span><text:span text:style-name="T116">перегляд</text:span><text:span text:style-name="T117">у</text:span><text:span text:style-name="T118">)</text:span><text:line-break/><draw:frame draw:style-name="a2" draw:name="drawing" text:anchor-type="as-char" svg:x="0in" svg:y="0in" svg:width="6.26042in" svg:height="2.52083in" style:rel-width="scale" style:rel-height="scale"><draw:image xlink:href="media/image3.png" xlink:type="simple" xlink:show="embed" xlink:actuate="onLoad"/><svg:title/><svg:desc/></draw:frame><text:tab/><text:tab/><text:tab/><text:tab/><text:span text:style-name="T119">рис.3 - A0 декомпоциція (</text:span><text:span text:style-name="T120">сценарій<text:s/></text:span><text:span text:style-name="T121">додавання)</text:span><text:line-break/><text:line-break/><draw:frame draw:style-name="a3" draw:name="drawing" text:anchor-type="as-char" svg:x="0in" svg:y="0in" svg:width="6.26042in" svg:height="1.63542in" style:rel-width="scale" style:rel-height="scale"><draw:image xlink:href="media/image4.png" xlink:type="simple" xlink:show="embed" xlink:actuate="onLoad"/><svg:title/><svg:desc/></draw:frame><text:line-break/><text:tab/><text:tab/><text:tab/><text:tab/><text:span text:style-name="T122">рис.4 - A2 декомпозиція</text:span><text:span text:style-name="T123"><text:s/>(процеси при додаванні)</text:span><text:span text:style-name="T124"><text:s/>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Заголовок2Знак">3</text:span><text:span text:style-name="Заголовок2Знак">.</text:span><text:span text:style-name="Заголовок2Знак"><text:s/></text:span><text:span text:style-name="Заголовок2Знак">структура BD (MySQL)</text:span><text:line-break/></text:p>
      <text:p text:style-name="Обычный"><text:span text:style-name="T125">ER-diagram</text:span><draw:frame draw:style-name="a4" draw:name="drawing" text:anchor-type="as-char" svg:x="0in" svg:y="0in" svg:width="5.4954in" svg:height="4.27928in" style:rel-width="scale" style:rel-height="scale"><draw:image xlink:href="media/image5.png" xlink:type="simple" xlink:show="embed" xlink:actuate="onLoad"/><svg:title/><svg:desc/></draw:frame><text:line-break/><text:span text:style-name="T126">-- Mermaid <text:s/>code <text:s/>for <text:s/>ER-diagram of DB</text:span><text:line-break/><text:span text:style-name="T127">erDiagram<text:s/></text:span></text:p>
      <text:p text:style-name="Безинтервала"><text:span text:style-name="T128"><text:s text:c="4"/>CATEGORIES {<text:s/></text:span></text:p>
      <text:p text:style-name="Безинтервала"><text:span text:style-name="T129"><text:s text:c="8"/>int category_id PK<text:s/></text:span></text:p>
      <text:p text:style-name="Безинтервала"><text:span text:style-name="T130"><text:s text:c="8"/>string name<text:s/></text:span></text:p>
      <text:p text:style-name="Безинтервала"><text:span text:style-name="T131"><text:s text:c="4"/>}<text:s/></text:span></text:p>
      <text:p text:style-name="Безинтервала"><text:span text:style-name="T132"><text:s text:c="2"/></text:span></text:p>
      <text:p text:style-name="Безинтервала"><text:span text:style-name="T133"><text:s text:c="4"/>ORGANIZATIONS {<text:s/></text:span></text:p>
      <text:p text:style-name="Безинтервала"><text:span text:style-name="T134"><text:s text:c="8"/>int org_id PK<text:s/></text:span></text:p>
      <text:p text:style-name="Безинтервала"><text:span text:style-name="T135"><text:s text:c="8"/>string name<text:s/></text:span></text:p>
      <text:p text:style-name="Безинтервала"><text:span text:style-name="T136"><text:s text:c="8"/>text description<text:s/></text:span></text:p>
      <text:p text:style-name="Безинтервала"><text:span text:style-name="T137"><text:s text:c="8"/>string website_url<text:s/></text:span></text:p>
      <text:p text:style-name="Безинтервала"><text:span text:style-name="T138"><text:s text:c="8"/>enum status "pending, approved, rejected"</text:span></text:p>
      <text:p text:style-name="Безинтервала"><text:span text:style-name="T139"><text:s text:c="8"/>datetime created_at<text:s/></text:span></text:p>
      <text:p text:style-name="Безинтервала"><text:span text:style-name="T140"><text:s text:c="8"/>datetime updated_at</text:span></text:p>
      <text:p text:style-name="Безинтервала"><text:span text:style-name="T141"><text:s text:c="8"/>datetime approved_at</text:span></text:p>
      <text:p text:style-name="Безинтервала"><text:span text:style-name="T142"><text:s text:c="8"/>text rejection_reason</text:span></text:p>
      <text:p text:style-name="Безинтервала"><text:span text:style-name="T143"><text:s text:c="8"/>boolean is_active<text:s/></text:span></text:p>
      <text:p text:style-name="Безинтервала"><text:span text:style-name="T144"><text:s text:c="4"/>}<text:s/></text:span></text:p>
      <text:p text:style-name="Безинтервала"><text:span text:style-name="T145"><text:s text:c="2"/></text:span></text:p>
      <text:p text:style-name="Безинтервала"><text:span text:style-name="T146"><text:s text:c="4"/>ORGANIZATION_CATEGORIES {<text:s/></text:span></text:p>
      <text:p text:style-name="Безинтервала"><text:span text:style-name="T147"><text:s text:c="8"/>int org_id PK, FK<text:s/></text:span></text:p>
      <text:p text:style-name="Безинтервала"><text:span text:style-name="T148"><text:s text:c="8"/>int category_id PK, FK<text:s/></text:span></text:p>
      <text:p text:style-name="Безинтервала"><text:span text:style-name="T149"><text:s text:c="4"/>}<text:s/></text:span></text:p>
      <text:p text:style-name="Безинтервала"><text:span text:style-name="T150"><text:s text:c="2"/></text:span></text:p>
      <text:p text:style-name="Безинтервала"><text:span text:style-name="T151"><text:s text:c="4"/>CATEGORIES ||--o{ ORGANIZATION_CATEGORIES : "has"<text:s/></text:span></text:p>
      <text:p text:style-name="Безинтервала"><text:span text:style-name="T152"><text:s text:c="4"/>ORGANIZATIONS ||--o{ ORGANIZATION_CATEGORIES : "classified as"</text:span></text:p>
      <text:p text:style-name="Обычный"><text:line-break/><text:line-break/><text:line-break/><text:line-break/><text:line-break/><text:line-break/><text:line-break/><text:line-break/><text:span text:style-name="Заголовок2Знак">4</text:span><text:span text:style-name="Заголовок2Знак">.</text:span><text:span text:style-name="Заголовок2Знак"><text:s/>ENDPOINT<text:s/></text:span><text:line-break/></text:p>
      <text:p text:style-name="Обычный"><text:span text:style-name="T153">A1 - Перегляд каталогу:<text:s/></text:span><text:line-break/><text:span text:style-name="T154">GET /api/organizations?category_id</text:span><text:span text:style-name="T155">= <text:s/>- <text:s/>організації зі статусом "approved" та is_active = true, фільтр по категорії</text:span><text:line-break/><text:span text:style-name="T156">GET /api/organizations/:id</text:span><text:span text:style-name="T157"><text:s/>- повна інфа про одну організацію<text:s/></text:span><text:line-break/><text:span text:style-name="T158">GET /api/categories</text:span><text:span text:style-name="T159"><text:s/>- категорії<text:s/></text:span><text:line-break/><text:line-break/><text:span text:style-name="T160">A2 - Додавання організації:<text:s/></text:span><text:line-break/><text:span text:style-name="T161">POST /api/organizations</text:span><text:span text:style-name="T162"><text:s/>- створити заявку на додавання (заявка набуває автоматичного статусу "pending")<text:s/></text:span><text:line-break/><text:span text:style-name="T163">POST /api/organizations/import</text:span><text:span text:style-name="T164"><text:s/>- завантаження даних організацій у CSV форматі. Система парсить файл, валідує кожен рядок і створює заявки зі статусом "pending"<text:s/></text:span><text:line-break/><text:line-break/><text:span text:style-name="T165">A3 - Модерація організацій:<text:s/></text:span><text:line-break/><text:span text:style-name="T166">GET /api/organizations?status=pending</text:span><text:span text:style-name="T167"><text:s/>- перегляд заявок в очікуванні (адмін)<text:s/></text:span><text:line-break/><text:span text:style-name="T168">PUT /api/organizations/:id/state</text:span><text:span text:style-name="T169"><text:s/>- зміна статусу організації (адмін) body: { "status": "approved" | "rejected", "rejection_reason": "string" }</text:span></text:p>
      <text:p text:style-name="Обычный"><text:line-break/><text:span text:style-name="T170">Примітка: поле is_active не має окремого endpoint'у. Адміністратор керує ним напряму через запит у базі даних: UPDATE organizations SET is_active = false WHERE org_id = ?; Організація зі статусом "approved" але is_active = false — не відображається в каталозі для користувача.</text:span><text:line-break/><text:line-break/><text:line-break/><text:span text:style-name="Заголовок2Знак">5. Статуси помилок (HTTP)</text:span><text:line-break/><text:tab/>400 “Bad Request” - невалідні дані, повертає {errors: [{field, message}]}<text:line-break/><text:tab/>404 “Not Found” - організація не знайдена<text:line-break/><text:tab/>409 “Conflict” - організація з такою назвою вже існує<text:line-break/><text:tab/>500 “Internal Server Error” - помилка серверу<text:line-break/><text:line-break/><text:line-break/><text:line-break/><text:line-break/><text:line-break/><text:line-break/><text:line-break/><text:span text:style-name="Заголовок2Знак">6. Правила валідації</text:span><text:line-break/><text:span text:style-name="Заголовок2Знак">6.1. Форма:</text:span><text:line-break/>name - обов’язкове (мін 2 символа - <text:s/>макс 255)<text:line-break/>description - <text:s/>необов’язкове (макс 1000 символів)<text:line-break/>website_url - необов’язкове (валідний URL формату<text:s/><text:span text:style-name="Гиперссылка">HTTPS://</text:span>)<text:line-break/>category_ids - обов’язкове (масив, мін 1 - макс 5 категорій)<text:s/><text:line-break/><text:span text:style-name="Заголовок2Знак">6.2. CSV файл:</text:span><text:line-break/>формат: .CSV, кодування UTF-8<text:line-break/>макс.<text:s/>розмір: 8MB<text:line-break/>макс.<text:s/>Рядків: 500 за 1 імпорт<text:line-break/>обов’язкові колонки: name<text:line-break/>необов’язкові колонки: description, website_url<text:line-break/>дублікати по name: пропустити, <text:s/>повернути в errors<text:line-break/>порожні рядки ігнорувати<text:line-break/><text:line-break/><text:line-break/><text:line-break/><text:span text:style-name="Заголовок2Знак">7</text:span><text:span text:style-name="Заголовок2Знак">.</text:span><text:span text:style-name="Заголовок2Знак"><text:s/></text:span><text:span text:style-name="Заголовок2Знак">Е</text:span><text:span text:style-name="Заголовок2Знак">тапи розробки MVP1 (1-ітерація)</text:span></text:p>
      <table:table table:style-name="Table171">
        <table:table-columns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Етап</text:p>
          </table:table-cell>
          <table:table-cell table:style-name="TableCell177">
            <text:p text:style-name="P178">здачі</text:p>
          </table:table-cell>
        </table:table-row>
        <table:table-row table:style-name="TableRow179">
          <table:table-cell table:style-name="TableCell180">
            <text:p text:style-name="P181">База</text:p>
          </table:table-cell>
          <table:table-cell table:style-name="TableCell182">
            <text:p text:style-name="P183">Ініціалізація проекту, підключення MySQL.</text:p>
          </table:table-cell>
        </table:table-row>
        <table:table-row table:style-name="TableRow184">
          <table:table-cell table:style-name="TableCell185">
            <text:p text:style-name="P186">Ядро<text:s/></text:p>
          </table:table-cell>
          <table:table-cell table:style-name="TableCell187">
            <text:p text:style-name="P188">CRUD організацій, CRUD категорій, зв’язки</text:p>
          </table:table-cell>
        </table:table-row>
        <table:table-row table:style-name="TableRow189">
          <table:table-cell table:style-name="TableCell190">
            <text:p text:style-name="P191">Імпорт</text:p>
          </table:table-cell>
          <table:table-cell table:style-name="TableCell192">
            <text:p text:style-name="P193">Валідація форми, парсинг CSV, валідація<text:s/>файлу.</text:p>
          </table:table-cell>
        </table:table-row>
        <table:table-row table:style-name="TableRow194">
          <table:table-cell table:style-name="TableCell195">
            <text:p text:style-name="P196">Модерація</text:p>
          </table:table-cell>
          <table:table-cell table:style-name="TableCell197">
            <text:p text:style-name="P198">Перегляд заявок зі статусом “pending” зміна статусу на “Approve/Reject”</text:p>
          </table:table-cell>
        </table:table-row>
        <table:table-row table:style-name="TableRow199">
          <table:table-cell table:style-name="TableCell200">
            <text:p text:style-name="P201">Збірка</text:p>
          </table:table-cell>
          <table:table-cell table:style-name="TableCell202">
            <text:p text:style-name="P203">Тестування, <text:s/>фінальна перевірка</text:p>
          </table:table-cell>
        </table:table-row>
      </table:table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margin-bottom="0in" fo:line-height="100%"/>
      <style:text-properties style:font-name-asian="MS Mincho" fo:language="en" fo:country="US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language="en" fo:country="US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Обычный" style:display-name="Обычный" style:family="paragraph">
      <style:text-properties fo:language="uk" fo:country="UA"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Безинтервала" style:display-name="Без интервала" style:family="paragraph">
      <style:paragraph-properties fo:margin-bottom="0in"/>
      <style:text-properties fo:hyphenate="false"/>
    </style:style>
    <style:style style:name="Заголовок1Знак" style:display-name="Заголовок 1 Знак" style:family="text">
      <style:text-properties style:font-name-asian="MS Mincho" fo:language="en" fo:country="US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/>
    </style:style>
    <style:style style:name="Оглавление1" style:display-name="Оглавление 1" style:family="paragraph" style:parent-style-name="Обычный" style:next-style-name="Обычный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>
      <style:paragraph-properties fo:margin-bottom="0.0694in" fo:margin-left="0.1527in">
        <style:tab-stops/>
      </style:paragraph-properties>
      <style:text-properties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MS Gothic" style:font-name-complex="Times New Roman" fo:color="#0F4761" fo:font-size="16pt" style:font-size-asian="16pt" style:font-size-complex="16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Роман Кучерявенко</meta:initial-creator>
    <dc:creator>Роман Кучерявенко</dc:creator>
    <meta:creation-date>2026-05-16T10:13:00Z</meta:creation-date>
    <dc:date>2026-05-16T10:13:00Z</dc:date>
    <meta:template xlink:href="Normal.dotm" xlink:type="simple"/>
    <meta:editing-cycles>2</meta:editing-cycles>
    <meta:editing-duration>PT0S</meta:editing-duration>
    <meta:document-statistic meta:page-count="1" meta:paragraph-count="8" meta:word-count="672" meta:character-count="4500" meta:row-count="31" meta:non-whitespace-character-count="3836"/>
  </office:meta>
</office:document-meta>
</file>